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Tahoma, Geneva, Verdana, sans-serif"/>
  </office:font-face-decls>
  <office:automatic-styles>
    <style:style style:name="Tabela1" style:family="table">
      <style:table-properties style:width="18cm" table:align="left"/>
    </style:style>
    <style:style style:name="Tabela1.A" style:family="table-column">
      <style:table-column-properties style:column-width="5.269cm"/>
    </style:style>
    <style:style style:name="Tabela1.B" style:family="table-column">
      <style:table-column-properties style:column-width="5.81cm"/>
    </style:style>
    <style:style style:name="Tabela1.C" style:family="table-column">
      <style:table-column-properties style:column-width="6.92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dos Recursos Implementados — LinguoUp</text:p>
      <text:p text:style-name="Text_20_body">Este documento apresenta uma visão consolidada de todos os recursos, infraestrutura, modelagem de dados e rotas de API que foram efetivamente implementados no projeto LinguoUp até o momento.</text:p>
      <text:p text:style-name="Horizontal_20_Line"/>
      <text:h text:style-name="Heading_20_2" text:outline-level="2">💻 1. Arquitetura e Configuração Global (Monorepo)</text:h>
      <text:p text:style-name="Text_20_body">O projeto está estruturado como um <text:span text:style-name="Strong_20_Emphasis">Monorepo</text:span> utilizando o gerenciador de pacotes <text:span text:style-name="Source_20_Text">pnpm</text:span> (com workspaces definidos no <text:span text:style-name="Source_20_Text">pnpm-workspace.yaml</text:span>). Essa estrutura separa as responsabilidades de forma clara e isolada:</text:p>
      <text:list xml:id="list1336132601" text:style-name="L1">
        <text:list-item>
          <text:p text:style-name="P3"><text:span text:style-name="Strong_20_Emphasis"><text:span text:style-name="Source_20_Text">apps/api</text:span></text:span>: Serviço backend desenvolvido em <text:span text:style-name="Strong_20_Emphasis">NestJS</text:span> e TypeScript, contendo a lógica de negócios, banco de dados e APIs REST. </text:p>
        </text:list-item>
        <text:list-item>
          <text:p text:style-name="P3"><text:span text:style-name="Strong_20_Emphasis"><text:span text:style-name="Source_20_Text">apps/mobile</text:span></text:span>: Aplicação mobile-first desenvolvida em <text:span text:style-name="Strong_20_Emphasis">React Native + Expo</text:span> e NativeWind (atualmente em estado de template/setup inicial). </text:p>
        </text:list-item>
        <text:list-item>
          <text:p text:style-name="P3"><text:span text:style-name="Strong_20_Emphasis"><text:span text:style-name="Source_20_Text">apps/web</text:span></text:span>: Painel administrativo web desenvolvido em <text:span text:style-name="Strong_20_Emphasis">Next.js</text:span> App Router e Tailwind CSS (atualmente em estado de template/setup inicial). </text:p>
        </text:list-item>
        <text:list-item>
          <text:p text:style-name="P3"><text:span text:style-name="Strong_20_Emphasis"><text:span text:style-name="Source_20_Text">apps/frontend</text:span></text:span>: Configuração e base para testes E2E utilizando <text:span text:style-name="Strong_20_Emphasis">Playwright</text:span>. </text:p>
        </text:list-item>
        <text:list-item>
          <text:p text:style-name="P3"><text:span text:style-name="Strong_20_Emphasis"><text:span text:style-name="Source_20_Text">packages/database</text:span></text:span>: Pacote compartilhado contendo as migrações, sementes (seeds) e a configuração do cliente <text:span text:style-name="Strong_20_Emphasis">Prisma ORM</text:span>. </text:p>
        </text:list-item>
        <text:list-item>
          <text:p text:style-name="P3"><text:span text:style-name="Strong_20_Emphasis"><text:span text:style-name="Source_20_Text">packages/ui</text:span></text:span>: Placeholder de biblioteca de componentes visuais compartilhados. </text:p>
        </text:list-item>
        <text:list-item>
          <text:p text:style-name="P2"><text:span text:style-name="Strong_20_Emphasis"><text:span text:style-name="Source_20_Text">packages/config</text:span></text:span>: Arquivos de regras globais compartilhadas (ESLint, Prettier, TSConfig). </text:p>
        </text:list-item>
      </text:list>
      <text:p text:style-name="Horizontal_20_Line"/>
      <text:h text:style-name="Heading_20_2" text:outline-level="2">🗄️ 2. Banco de Dados &amp; Modelagem (Prisma ORM)</text:h>
      <text:p text:style-name="Text_20_body">O banco de dados configurado é o <text:span text:style-name="Strong_20_Emphasis">PostgreSQL</text:span>, com o schema totalmente mapeado no <text:a xlink:type="simple" xlink:href="../../packages/database/prisma/schema.prisma" text:style-name="Internet_20_link" text:visited-style-name="Visited_20_Internet_20_Link">schema.prisma</text:a>. A estrutura implementada inclui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Heading">Modelo</text:p>
          </table:table-cell>
          <table:table-cell table:style-name="Tabela1.A1" office:value-type="string">
            <text:p text:style-name="Table_20_Heading">Descrição</text:p>
          </table:table-cell>
          <table:table-cell table:style-name="Tabela1.A1" office:value-type="string">
            <text:p text:style-name="Table_20_Heading">Principais Campos</text:p>
          </table:table-cell>
        </table:table-row>
        <table:table-row>
          <table:table-cell table:style-name="Tabela1.A1" office:value-type="string">
            <text:p text:style-name="Table_20_Contents">:---</text:p>
          </table:table-cell>
          <table:table-cell table:style-name="Tabela1.A1" office:value-type="string">
            <text:p text:style-name="Table_20_Contents">:---</text:p>
          </table:table-cell>
          <table:table-cell table:style-name="Tabela1.A1" office:value-type="string">
            <text:p text:style-name="Table_20_Contents">:---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Source_20_Text">User</text:span></text:span></text:p>
          </table:table-cell>
          <table:table-cell table:style-name="Tabela1.A1" office:value-type="string">
            <text:p text:style-name="Table_20_Contents">Registro central do usuário.</text:p>
          </table:table-cell>
          <table:table-cell table:style-name="Tabela1.A1" office:value-type="string">
            <text:p text:style-name="Table_20_Contents"><text:span text:style-name="Source_20_Text">id</text:span>, <text:span text:style-name="Source_20_Text">email</text:span>, <text:span text:style-name="Source_20_Text">name</text:span>, <text:span text:style-name="Source_20_Text">passwordHash</text:span>, <text:span text:style-name="Source_20_Text">role</text:span> (USER, ADMIN, SUPER_ADMIN), <text:span text:style-name="Source_20_Text">tenant_id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Source_20_Text">UserPreferences</text:span></text:span></text:p>
          </table:table-cell>
          <table:table-cell table:style-name="Tabela1.A1" office:value-type="string">
            <text:p text:style-name="Table_20_Contents">Preferências de estudo do usuário.</text:p>
          </table:table-cell>
          <table:table-cell table:style-name="Tabela1.A1" office:value-type="string">
            <text:p text:style-name="Table_20_Contents"><text:span text:style-name="Source_20_Text">targetLanguage</text:span>, <text:span text:style-name="Source_20_Text">learningGoal</text:span>, <text:span text:style-name="Source_20_Text">dailyGoalMinutes</text:span>, <text:span text:style-name="Source_20_Text">preferredStudyTime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Source_20_Text">Lesson</text:span></text:span></text:p>
          </table:table-cell>
          <table:table-cell table:style-name="Tabela1.A1" office:value-type="string">
            <text:p text:style-name="Table_20_Contents">Lições de idiomas cadastradas.</text:p>
          </table:table-cell>
          <table:table-cell table:style-name="Tabela1.A1" office:value-type="string">
            <text:p text:style-name="Table_20_Contents"><text:span text:style-name="Source_20_Text">title</text:span>, <text:span text:style-name="Source_20_Text">description</text:span>, <text:span text:style-name="Source_20_Text">level</text:span>, <text:span text:style-name="Source_20_Text">theme</text:span>, <text:span text:style-name="Source_20_Text">durationMinutes</text:span>, <text:span text:style-name="Source_20_Text">content</text:span> (JSON)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Source_20_Text">LessonCompletion</text:span></text:span></text:p>
          </table:table-cell>
          <table:table-cell table:style-name="Tabela1.A1" office:value-type="string">
            <text:p text:style-name="Table_20_Contents">Histórico de lições finalizadas.</text:p>
          </table:table-cell>
          <table:table-cell table:style-name="Tabela1.A1" office:value-type="string">
            <text:p text:style-name="Table_20_Contents"><text:span text:style-name="Source_20_Text">userId</text:span>, <text:span text:style-name="Source_20_Text">lessonId</text:span>, <text:span text:style-name="Source_20_Text">completedAt</text:span>, <text:span text:style-name="Source_20_Text">score</text:span>, <text:span text:style-name="Source_20_Text">xpEarned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Source_20_Text">UserProgress</text:span></text:span></text:p>
          </table:table-cell>
          <table:table-cell table:style-name="Tabela1.A1" office:value-type="string">
            <text:p text:style-name="Table_20_Contents">Acompanhamento do progresso geral.</text:p>
          </table:table-cell>
          <table:table-cell table:style-name="Tabela1.A1" office:value-type="string">
            <text:p text:style-name="Table_20_Contents"><text:span text:style-name="Source_20_Text">totalXP</text:span>, <text:span text:style-name="Source_20_Text">currentLevel</text:span>, <text:span text:style-name="Source_20_Text">currentStreakDays</text:span>, <text:span text:style-name="Source_20_Text">longestStreak</text:span>, <text:span text:style-name="Source_20_Text">lastActivityDate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Source_20_Text">Achievement</text:span></text:span> / <text:span text:style-name="Strong_20_Emphasis"><text:span text:style-name="Source_20_Text">UserAchievement</text:span></text:span></text:p>
          </table:table-cell>
          <table:table-cell table:style-name="Tabela1.A1" office:value-type="string">
            <text:p text:style-name="Table_20_Contents">Sistema de conquistas e gamificação.</text:p>
          </table:table-cell>
          <table:table-cell table:style-name="Tabela1.A1" office:value-type="string">
            <text:p text:style-name="Table_20_Contents"><text:span text:style-name="Source_20_Text">name</text:span>, <text:span text:style-name="Source_20_Text">description</text:span>, <text:span text:style-name="Source_20_Text">xpReward</text:span>, <text:span text:style-name="Source_20_Text">criteria</text:span> (JSON)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Source_20_Text">SpacedReviewItem</text:span></text:span></text:p>
          </table:table-cell>
          <table:table-cell table:style-name="Tabela1.A1" office:value-type="string">
            <text:p text:style-name="Table_20_Contents">Itens do algoritmo de repetição espaçada (SM-2).</text:p>
          </table:table-cell>
          <table:table-cell table:style-name="Tabela1.A1" office:value-type="string">
            <text:p text:style-name="Table_20_Contents"><text:span text:style-name="Source_20_Text">nextReviewAt</text:span>, <text:span text:style-name="Source_20_Text">easeFactor</text:span>, <text:span text:style-name="Source_20_Text">interval</text:span>, <text:span text:style-name="Source_20_Text">repetitions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Source_20_Text">Notification</text:span></text:span></text:p>
          </table:table-cell>
          <table:table-cell table:style-name="Tabela1.A1" office:value-type="string">
            <text:p text:style-name="Table_20_Contents">Alertas e lembretes gerados para o usuário.</text:p>
          </table:table-cell>
          <table:table-cell table:style-name="Tabela1.A1" office:value-type="string">
            <text:p text:style-name="Table_20_Contents"><text:span text:style-name="Source_20_Text">type</text:span>, <text:span text:style-name="Source_20_Text">message</text:span>, <text:span text:style-name="Source_20_Text">readAt</text:span>, <text:span text:style-name="Source_20_Text">createdAt</text:span></text:p>
          </table:table-cell>
        </table:table-row>
      </table:table>
      <text:p text:style-name="Horizontal_20_Line"/>
      <text:h text:style-name="Heading_20_2" text:outline-level="2">🔑 3. API de Autenticação e Segurança (NestJS)</text:h>
      <text:p text:style-name="Text_20_body">O módulo de autenticação (<text:span text:style-name="Source_20_Text">AuthModule</text:span>) está totalmente implementado e validado no backend NestJS (<text:span text:style-name="Source_20_Text">apps/api</text:span>). Os recursos incluem:</text:p>
      <text:h text:style-name="Heading_20_3" text:outline-level="3">Rotas e Endpoints (Base URL: <text:span text:style-name="Source_20_Text">/api/v1/auth</text:span>)</text:h>
      <text:list xml:id="list1571614837" text:style-name="L2">
        <text:list-item>
          <text:p text:style-name="P5"><text:span text:style-name="Strong_20_Emphasis"><text:span text:style-name="Source_20_Text">POST /register</text:span></text:span>: Criação de novas contas de usuário. </text:p>
        </text:list-item>
        <text:list-item>
          <text:p text:style-name="P5">Valida a senha, executa hash criptográfico (bcrypt/argon2 equivalente) e associa o usuário a um <text:span text:style-name="Source_20_Text">tenant_id</text:span> padrão. </text:p>
        </text:list-item>
        <text:list-item>
          <text:p text:style-name="P5"><text:span text:style-name="Strong_20_Emphasis"><text:span text:style-name="Source_20_Text">POST /login</text:span></text:span>: Autenticação de usuários cadastrados. </text:p>
        </text:list-item>
        <text:list-item>
          <text:p text:style-name="P5">Retorna o <text:span text:style-name="Source_20_Text">accessToken</text:span> (JWT) no corpo da resposta com tempo curto de expiração. </text:p>
        </text:list-item>
        <text:list-item>
          <text:p text:style-name="P5">Salva o <text:span text:style-name="Source_20_Text">refreshToken</text:span> rotativo em um cookie de segurança HTTP-Only (<text:span text:style-name="Source_20_Text">passthrough: true</text:span>, <text:span text:style-name="Source_20_Text">secure: true</text:span> em prod, <text:span text:style-name="Source_20_Text">sameSite: strict</text:span>, <text:span text:style-name="Source_20_Text">path: /api/v1/auth</text:span>, <text:span text:style-name="Source_20_Text">maxAge: 30 dias</text:span>). </text:p>
        </text:list-item>
        <text:list-item>
          <text:p text:style-name="P5"><text:span text:style-name="Strong_20_Emphasis"><text:span text:style-name="Source_20_Text">POST /refresh</text:span></text:span>: Rotação automática de tokens (Refresh Token Rotation). </text:p>
        </text:list-item>
        <text:list-item>
          <text:p text:style-name="P5">Lê o refresh token do cookie, invalida o antigo, gera um novo par de tokens (Access + Refresh) e atualiza o cookie do cliente. </text:p>
        </text:list-item>
        <text:list-item>
          <text:p text:style-name="P5"><text:span text:style-name="Strong_20_Emphasis"><text:span text:style-name="Source_20_Text">POST /logout</text:span></text:span>: Encerramento seguro da sessão. </text:p>
        </text:list-item>
        <text:list-item>
          <text:p text:style-name="P4">Limpa o cookie <text:span text:style-name="Source_20_Text">refreshToken</text:span> no navegador/cliente e invalida a sessão no servidor. </text:p>
        </text:list-item>
      </text:list>
      <text:h text:style-name="Heading_20_3" text:outline-level="3">Proteções e Autorizações</text:h>
      <text:list xml:id="list3616817539" text:style-name="L3">
        <text:list-item>
          <text:p text:style-name="P7"><text:span text:style-name="Strong_20_Emphasis">Rate Limiting</text:span>: Configurado globalmente via <text:span text:style-name="Source_20_Text">ThrottlerModule</text:span> (limite padrão de 10 requisições por minuto por cliente). </text:p>
        </text:list-item>
        <text:list-item>
          <text:p text:style-name="P7"><text:span text:style-name="Strong_20_Emphasis">Guarda de Autenticação</text:span>: <text:span text:style-name="Source_20_Text">JwtAuthGuard</text:span> implementado e ativado para proteger endpoints restritos da API. </text:p>
        </text:list-item>
        <text:list-item>
          <text:p text:style-name="P6"><text:span text:style-name="Strong_20_Emphasis">Controle de Acesso (RBAC)</text:span>: <text:span text:style-name="Source_20_Text">RolesGuard</text:span> e o decorator <text:span text:style-name="Source_20_Text">@Roles(...)</text:span> criados para restringir endpoints de acordo com a regra de acesso do usuário (<text:span text:style-name="Source_20_Text">USER</text:span>, <text:span text:style-name="Source_20_Text">ADMIN</text:span> ou <text:span text:style-name="Source_20_Text">SUPER_ADMIN</text:span>). </text:p>
        </text:list-item>
      </text:list>
      <text:p text:style-name="Horizontal_20_Line"/>
      <text:h text:style-name="Heading_20_2" text:outline-level="2">📊 4. Observabilidade &amp; Logs Estruturados</text:h>
      <text:p text:style-name="Text_20_body">Em total conformidade com as diretrizes do projeto, foi implementado o serviço <text:span text:style-name="Source_20_Text">StructuredLogger</text:span> no backend NestJS:</text:p>
      <text:list xml:id="list1670716873" text:style-name="L4">
        <text:list-item>
          <text:p text:style-name="P9"><text:span text:style-name="Strong_20_Emphasis">Logs Estruturados</text:span>: Cada evento crítico gera um log contendo metadados detalhados: </text:p>
        </text:list-item>
        <text:list-item>
          <text:p text:style-name="P9"><text:span text:style-name="Source_20_Text">timestamp</text:span>: Data e hora exata. </text:p>
        </text:list-item>
        <text:list-item>
          <text:p text:style-name="P9"><text:span text:style-name="Source_20_Text">level</text:span>: Severidade (Log, Warn, Error). </text:p>
        </text:list-item>
        <text:list-item>
          <text:p text:style-name="P9"><text:span text:style-name="Source_20_Text">service</text:span>: Nome do módulo/controlador emissor (ex: <text:span text:style-name="Source_20_Text">auth-controller</text:span>). </text:p>
        </text:list-item>
        <text:list-item>
          <text:p text:style-name="P9"><text:span text:style-name="Source_20_Text">trace_id</text:span>: UUID único para rastreamento de requisições de ponta a ponta. </text:p>
        </text:list-item>
        <text:list-item>
          <text:p text:style-name="P9"><text:span text:style-name="Source_20_Text">user_id</text:span>: Identificação do usuário (quando logado). </text:p>
        </text:list-item>
        <text:list-item>
          <text:p text:style-name="P8"><text:span text:style-name="Source_20_Text">tenant_id</text:span>: Identificação do locatário/inquilino (multi-tenancy). </text:p>
        </text:list-item>
      </text:list>
      <text:p text:style-name="Horizontal_20_Line"/>
      <text:h text:style-name="Heading_20_2" text:outline-level="2">🚀 5. Pipelines de CI/CD e Deployment</text:h>
      <text:p text:style-name="Text_20_body">A automação do projeto foi desenvolvida para suportar integração contínua (CI) e entrega contínua (CD) em produção:</text:p>
      <text:list xml:id="list3164413093" text:style-name="L5">
        <text:list-item>
          <text:p text:style-name="P10"><text:span text:style-name="Strong_20_Emphasis">Pipeline de CD (</text:span><text:span text:style-name="Strong_20_Emphasis"><text:span text:style-name="Source_20_Text">cd-production.yml</text:span></text:span><text:span text:style-name="Strong_20_Emphasis">)</text:span>: </text:p>
        </text:list-item>
      </text:list>
      <text:p text:style-name="Text_20_body">1. Executa validações automatizadas (<text:span text:style-name="Source_20_Text">pnpm lint</text:span>, <text:span text:style-name="Source_20_Text">pnpm typecheck</text:span>, <text:span text:style-name="Source_20_Text">pnpm test</text:span>, <text:span text:style-name="Source_20_Text">pnpm build</text:span>).</text:p>
      <text:p text:style-name="Text_20_body">2. Executa migrações automáticas de banco de dados (<text:span text:style-name="Source_20_Text">prisma migrate deploy</text:span>).</text:p>
      <text:p text:style-name="Text_20_body">3. Deploy da API Backend no <text:span text:style-name="Strong_20_Emphasis">Railway</text:span>.</text:p>
      <text:p text:style-name="Text_20_body">4. Deploy do Painel Web Admin e Frontend no <text:span text:style-name="Strong_20_Emphasis">Vercel</text:span>.</text:p>
      <text:list xml:id="list1746449489" text:style-name="L6">
        <text:list-item>
          <text:p text:style-name="P11"><text:span text:style-name="Strong_20_Emphasis">Deploy Local</text:span>: Setup pronto via <text:span text:style-name="Source_20_Text">docker-compose.yml</text:span> para levantar a imagem do banco PostgreSQL com um clique. </text:p>
        </text:list-item>
      </text:list>
      <text:p text:style-name="Horizontal_20_Line"/>
      <text:h text:style-name="Heading_20_2" text:outline-level="2">🗓️ 6. Próximos Recursos Mapeados no Roadmap</text:h>
      <text:p text:style-name="Text_20_body">Com a fundação técnica e a autenticação concluídas, os próximos domínios a serem implementados no monorepo são:</text:p>
      <text:p text:style-name="Text_20_body">1. <text:span text:style-name="Strong_20_Emphasis">API de Usuários e Onboarding</text:span> (<text:span text:style-name="Source_20_Text">chg-005</text:span>): Armazenamento de preferências capturadas no onboarding.</text:p>
      <text:p text:style-name="Text_20_body">2. <text:span text:style-name="Strong_20_Emphasis">API de Lições e Trilhas</text:span> (<text:span text:style-name="Source_20_Text">chg-006</text:span>): Distribuição de microlições e gerenciamento de conteúdo.</text:p>
      <text:p text:style-name="Text_20_body">3. <text:span text:style-name="Strong_20_Emphasis">API de Progresso &amp; Streaks</text:span> (<text:span text:style-name="Source_20_Text">chg-007</text:span>): Lógica de cálculo de ofensivas (estudos diários consecutivos).</text:p>
      <text:p text:style-name="Text_20_body">4. <text:span text:style-name="Strong_20_Emphasis">API de Gamificação</text:span> (<text:span text:style-name="Source_20_Text">chg-008</text:span>): Liberação de insígnias, conquistas e ganho de pontos de experiência (XP).</text:p>
      <text:p text:style-name="Text_20_body">5. <text:span text:style-name="Strong_20_Emphasis">API de Revisão Inteligente</text:span> (<text:span text:style-name="Source_20_Text">chg-009</text:span>): Implementação do algoritmo SuperMemo (SM-2) para revisões periódicas.</text:p>
      <text:p text:style-name="Text_20_body">6. <text:span text:style-name="Strong_20_Emphasis">API de Notificações</text:span> (<text:span text:style-name="Source_20_Text">chg-010</text:span>): Lembretes e notificações push.</text:p>
      <text:p text:style-name="Text_20_body">7. <text:span text:style-name="Strong_20_Emphasis">Aplicativo Mobile (Fase 3)</text:span>: Design system com NativeWind e conexão com as APIs desenvolvid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Tahoma, Geneva, 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pt" fo:country="BR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323cm" fo:margin-right="1.323cm" fo:margin-top="1.323cm" fo:margin-bottom="1.323cm" style:contextual-spacing="false" fo:line-height="160%" fo:text-indent="0cm" style:auto-text-indent="false"/>
      <style:text-properties fo:color="#2c3e50" loext:opacity="100%" style:font-name="Segoe UI" fo:font-family="'Segoe UI', Tahoma, Geneva, Verdana, sans-serif" style:font-name-asian="Segoe UI" style:font-family-asian="'Segoe UI', Tahoma, Geneva, Verdana, sans-serif" style:font-name-complex="Segoe UI" style:font-family-complex="'Segoe UI', Tahoma, Geneva, Verdana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text-properties fo:color="#4a5568" loext:opacity="100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padding-left="0cm" fo:padding-right="0cm" fo:padding-top="0cm" fo:padding-bottom="0.318cm" fo:border-left="none" fo:border-right="none" fo:border-top="none" fo:border-bottom="2.24pt solid #4648d4"/>
      <style:text-properties fo:color="#4648d4" loext:opacity="100%" style:font-name="Liberation Sans Unicode MS" fo:font-family="'Liberation Sans Unicode MS'" style:font-pitch="variable" fo:font-size="19.5pt" fo:font-weight="bold" style:font-size-asian="19.5pt" style:font-weight-asian="bold" style:font-size-complex="19.5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  <style:text-properties fo:color="#34495e" loext:opacity="100%" fo:font-size="10.5pt" style:font-size-asian="10.5pt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926cm" fo:margin-bottom="0.212cm" style:contextual-spacing="false" fo:padding-left="0cm" fo:padding-right="0cm" fo:padding-top="0cm" fo:padding-bottom="0.159cm" fo:border-left="none" fo:border-right="none" fo:border-top="none" fo:border-bottom="0.06pt solid #e0e0e0"/>
      <style:text-properties fo:color="#2c3e50" loext:opacity="100%" style:font-name="Liberation Serif" fo:font-family="'Liberation Serif'" style:font-family-generic="roman" style:font-pitch="variable" fo:font-size="15pt" fo:font-weight="bold" style:font-name-asian="Noto Serif CJK SC" style:font-family-asian="'Noto Serif CJK SC'" style:font-family-generic-asian="system" style:font-pitch-asian="variable" style:font-size-asian="15pt" style:font-weight-asian="bold" style:font-name-complex="Lohit Devanagari1" style:font-family-complex="'Lohit Devanagari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661cm" fo:margin-bottom="0.212cm" style:contextual-spacing="false"/>
      <style:text-properties fo:color="#1a252f" loext:opacity="100%"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529cm" fo:margin-right="0.529cm" fo:margin-top="0.529cm" fo:margin-bottom="0.529cm" style:contextual-spacing="false" fo:text-indent="0cm" style:auto-text-indent="false" fo:padding="0.397cm" fo:border-left="3pt solid #eaeded" fo:border-right="0.06pt solid #eaeded" fo:border-top="0.06pt solid #eaeded" fo:border-bottom="0.06pt solid #eaeded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2c3e50" loext:opacity="100%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4648d4" loext:opacity="100%" style:text-line-through-style="none" style:text-line-through-type="none" style:text-underline-style="none" fo:font-weight="bold" style:text-blinking="false" style:font-weight-asian="bold" style:font-weight-complex="bold" style:text-overline-style="none" style:text-overline-color="font-color"/>
    </style:style>
    <style:style style:name="Source_20_Text" style:display-name="Source Text" style:family="text">
      <style:text-properties style:font-name="Courier New" fo:font-family="'Courier New', Courier, monospace" fo:font-size="9.75pt" fo:background-color="#f7f9fa" style:font-name-asian="Courier New" style:font-family-asian="'Courier New', Courier, monospace" style:font-size-asian="9.75pt" style:font-name-complex="Courier New" style:font-family-complex="'Courier New', Courier, monospace" style:font-size-complex="9.7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4648d4" loext:opacity="100%" style:text-line-through-style="none" style:text-line-through-type="none" style:text-underline-style="none" fo:font-weight="bold" style:text-blinking="false" style:font-weight-asian="bold" style:font-weight-complex="bold" style:text-overline-style="none" style:text-ov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sumo dos Recursos - LinguoUp</dc:title>
    <meta:document-statistic meta:table-count="1" meta:image-count="0" meta:object-count="0" meta:page-count="1" meta:paragraph-count="85" meta:word-count="800" meta:character-count="5665" meta:non-whitespace-character-count="4949"/>
    <meta:generator>LibreOffice/7.3.7.2$Linux_X86_64 LibreOffice_project/30$Build-2</meta:generator>
    <meta:user-defined meta:name=""/>
  </office:meta>
</office:document-meta>
</file>